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2811in" style:type="right"/>
        </style:tab-stops>
      </style:paragraph-properties>
    </style:style>
    <style:style style:name="P2" style:family="paragraph" style:parent-style-name="Standard">
      <style:paragraph-properties fo:orphans="0" fo:widows="0">
        <style:tab-stops>
          <style:tab-stop style:position="6.2811in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 fo:break-before="auto" fo:break-after="auto" fo:padding="0in" fo:border="none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 style:list-style-name="WWNum16">
      <style:paragraph-properties fo:margin-left="0.5in" fo:margin-right="0in" fo:text-indent="-0.25in" style:auto-text-indent="false">
        <style:tab-stops>
          <style:tab-stop style:position="6.2811in" style:type="right"/>
        </style:tab-stops>
      </style:paragraph-properties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>
        <style:tab-stops>
          <style:tab-stop style:position="6.2811in" style:type="right"/>
        </style:tab-stops>
      </style:paragraph-properties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>
        <style:tab-stops>
          <style:tab-stop style:position="6.2811in" style:type="right"/>
        </style:tab-stops>
      </style:paragraph-properties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>
        <style:tab-stops>
          <style:tab-stop style:position="6.2811in" style:type="right"/>
        </style:tab-stops>
      </style:paragraph-properties>
    </style:style>
    <style:style style:name="P9" style:family="paragraph" style:parent-style-name="Standard" style:list-style-name="WWNum13">
      <style:paragraph-properties fo:margin-left="0.5in" fo:margin-right="0in" fo:text-indent="-0.25in" style:auto-text-indent="false">
        <style:tab-stops>
          <style:tab-stop style:position="6.2811in" style:type="right"/>
        </style:tab-stops>
      </style:paragraph-properties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>
        <style:tab-stops>
          <style:tab-stop style:position="6.2811in" style:type="right"/>
        </style:tab-stops>
      </style:paragraph-properties>
    </style:style>
    <style:style style:name="P11" style:family="paragraph" style:parent-style-name="Standard" style:list-style-name="WWNum7">
      <style:paragraph-properties fo:margin-left="0.5in" fo:margin-right="0in" fo:orphans="0" fo:widows="0" fo:text-indent="-0.25in" style:auto-text-indent="false">
        <style:tab-stops>
          <style:tab-stop style:position="6.2811in" style:type="right"/>
        </style:tab-stops>
      </style:paragraph-properties>
    </style:style>
    <style:style style:name="P12" style:family="paragraph" style:parent-style-name="Standard" style:list-style-name="WWNum8">
      <style:paragraph-properties fo:margin-left="0.5in" fo:margin-right="0in" fo:orphans="0" fo:widows="0" fo:text-indent="-0.25in" style:auto-text-indent="false">
        <style:tab-stops>
          <style:tab-stop style:position="6.2811in" style:type="right"/>
        </style:tab-stops>
      </style:paragraph-properties>
    </style:style>
    <style:style style:name="P13" style:family="paragraph" style:parent-style-name="Standard" style:list-style-name="WWNum10">
      <style:paragraph-properties fo:margin-left="0.5in" fo:margin-right="0in" fo:orphans="0" fo:widows="0" fo:text-indent="-0.25in" style:auto-text-indent="false">
        <style:tab-stops>
          <style:tab-stop style:position="6.2811in" style:type="right"/>
        </style:tab-stops>
      </style:paragraph-properties>
    </style:style>
    <style:style style:name="P1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orphans="0" fo:widows="0" fo:text-indent="-0.25in" style:auto-text-indent="false" fo:break-before="auto" fo:break-after="auto">
        <style:tab-stops>
          <style:tab-stop style:position="6.2811in" style:type="right"/>
        </style:tab-stops>
      </style:paragraph-properties>
    </style:style>
    <style:style style:name="P17" style:family="paragraph" style:parent-style-name="Standard" style:list-style-name="WWNum15">
      <style:paragraph-properties fo:margin-left="0.5in" fo:margin-right="0in" fo:orphans="0" fo:widows="0" fo:text-indent="-0.25in" style:auto-text-indent="false" fo:break-before="auto" fo:break-after="auto">
        <style:tab-stops>
          <style:tab-stop style:position="6.2811in" style:type="right"/>
        </style:tab-stops>
      </style:paragraph-properties>
    </style:style>
    <style:style style:name="P18" style:family="paragraph" style:parent-style-name="Standard" style:list-style-name="WWNum11">
      <style:paragraph-properties fo:margin-left="0.5in" fo:margin-right="0in" fo:orphans="0" fo:widows="0" fo:text-indent="-0.25in" style:auto-text-indent="false" fo:break-before="auto" fo:break-after="auto">
        <style:tab-stops>
          <style:tab-stop style:position="6.2811in" style:type="right"/>
        </style:tab-stops>
      </style:paragraph-properties>
    </style:style>
    <style:style style:name="P19" style:family="paragraph" style:parent-style-name="Standard" style:list-style-name="WWNum12">
      <style:paragraph-properties fo:margin-left="0.5in" fo:margin-right="0in" fo:orphans="0" fo:widows="0" fo:text-indent="-0.25in" style:auto-text-indent="false" fo:break-before="auto" fo:break-after="auto">
        <style:tab-stops>
          <style:tab-stop style:position="6.2811in" style:type="right"/>
        </style:tab-stops>
      </style:paragraph-properties>
    </style:style>
    <style:style style:name="P20" style:family="paragraph" style:parent-style-name="Standard" style:list-style-name="WWNum10">
      <style:paragraph-properties fo:margin-left="0.5in" fo:margin-right="0in" fo:orphans="0" fo:widows="0" fo:text-indent="-0.25in" style:auto-text-indent="false" fo:break-before="auto" fo:break-after="auto">
        <style:tab-stops>
          <style:tab-stop style:position="6.2811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orphans="0" fo:widows="0" fo:text-indent="-0.25in" style:auto-text-indent="false" fo:break-before="auto" fo:break-after="auto"/>
    </style:style>
    <style:style style:name="P22" style:family="paragraph" style:parent-style-name="Standard" style:list-style-name="WWNum2">
      <style:paragraph-properties fo:margin-left="0.5in" fo:margin-right="0in" fo:orphans="0" fo:widows="0" fo:text-indent="-0.25in" style:auto-text-indent="false" fo:break-before="auto" fo:break-after="auto" fo:padding="0in" fo:border="none">
        <style:tab-stops>
          <style:tab-stop style:position="6.2811in" style:type="right"/>
        </style:tab-stops>
      </style:paragraph-properties>
    </style:style>
    <style:style style:name="P23" style:family="paragraph" style:parent-style-name="Standard" style:list-style-name="WWNum10">
      <style:paragraph-properties fo:margin-left="0.5in" fo:margin-right="0in" fo:orphans="0" fo:widows="0" fo:text-indent="-0.25in" style:auto-text-indent="false" fo:break-before="auto" fo:break-after="auto" fo:padding="0in" fo:border="none">
        <style:tab-stops>
          <style:tab-stop style:position="6.2811in" style:type="right"/>
        </style:tab-stops>
      </style:paragraph-properties>
    </style:style>
    <style:style style:name="P24" style:family="paragraph" style:parent-style-name="Standard" style:list-style-name="WWNum6">
      <style:paragraph-properties fo:margin-left="0.5in" fo:margin-right="0in" fo:text-indent="-0.25in" style:auto-text-indent="false" fo:break-before="auto" fo:break-after="auto" fo:padding="0in" fo:border="none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6.2811in" style:type="right"/>
        </style:tab-stops>
      </style:paragraph-properties>
    </style:style>
    <style:style style:name="P26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6.2811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orphans="0" fo:widows="0" fo:text-indent="0in" style:auto-text-indent="false" fo:break-before="auto" fo:break-after="auto">
        <style:tab-stops>
          <style:tab-stop style:position="6.2811in" style:type="right"/>
        </style:tab-stops>
      </style:paragraph-properties>
    </style:style>
    <style:style style:name="P28" style:family="paragraph" style:parent-style-name="Standard">
      <style:paragraph-properties fo:margin-top="0in" fo:margin-bottom="0.139in" loext:contextual-spacing="false" fo:line-height="100%" fo:orphans="0" fo:widows="0" fo:break-before="auto" fo:break-after="auto">
        <style:tab-stops>
          <style:tab-stop style:position="6.2811in" style:type="right"/>
        </style:tab-stops>
      </style:paragraph-properties>
    </style:style>
    <style:style style:name="P29" style:family="paragraph" style:parent-style-name="Heading_20_1" style:master-page-name="First_20_Page">
      <style:paragraph-properties fo:text-align="center" style:justify-single-word="false" style:page-number="1" fo:break-before="auto" fo:break-after="auto" fo:padding="0in" fo:border="none"/>
    </style:style>
    <style:style style:name="P30" style:family="paragraph" style:parent-style-name="Heading_20_4">
      <style:paragraph-properties fo:orphans="0" fo:widows="0" fo:break-before="auto" fo:break-after="auto">
        <style:tab-stops>
          <style:tab-stop style:position="6.2811in" style:type="right"/>
        </style:tab-stops>
      </style:paragraph-properties>
    </style:style>
    <style:style style:name="P31" style:family="paragraph" style:parent-style-name="Heading_20_3">
      <style:paragraph-properties>
        <style:tab-stops>
          <style:tab-stop style:position="6.2811in" style:type="right"/>
        </style:tab-stops>
      </style:paragraph-properties>
    </style:style>
    <style:style style:name="P32" style:family="paragraph" style:parent-style-name="Heading_20_3">
      <style:paragraph-properties fo:orphans="0" fo:widows="0">
        <style:tab-stops>
          <style:tab-stop style:position="6.2811in" style:type="right"/>
        </style:tab-stops>
      </style:paragraph-properties>
    </style:style>
    <style:style style:name="P33" style:family="paragraph" style:parent-style-name="Heading_20_3">
      <style:paragraph-properties fo:break-before="auto" fo:break-after="auto" fo:padding="0in" fo:border="none"/>
    </style:style>
    <style:style style:name="P34" style:family="paragraph" style:parent-style-name="Heading_20_3">
      <style:paragraph-properties fo:break-before="auto" fo:break-after="auto"/>
    </style:style>
    <style:style style:name="P35" style:family="paragraph" style:parent-style-name="Heading_20_3">
      <style:paragraph-properties fo:orphans="0" fo:widows="0" fo:break-before="auto" fo:break-after="auto">
        <style:tab-stops>
          <style:tab-stop style:position="6.2811in" style:type="right"/>
        </style:tab-stops>
      </style:paragraph-properties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style="italic" style:font-name-asian="Roboto1" style:font-style-asian="italic" style:font-name-complex="Roboto1" style:font-style-complex="italic"/>
    </style:style>
    <style:style style:name="T3" style:family="text">
      <style:text-properties style:font-name="Roboto" fo:font-weight="bold" style:font-name-asian="Roboto1" style:font-weight-asian="bold" style:font-name-complex="Roboto1" style:font-weight-complex="bold"/>
    </style:style>
    <style:style style:name="T4" style:family="text">
      <style:text-properties style:font-name="Roboto" style:text-underline-style="none" style:font-name-asian="Roboto1" style:font-name-complex="Roboto1"/>
    </style:style>
    <style:style style:name="T5" style:family="text">
      <style:text-properties fo:color="#000000" style:font-name="Roboto" fo:font-size="11pt" style:font-name-asian="Roboto1" style:font-size-asian="11pt" style:font-name-complex="Roboto1" style:font-size-complex="11pt"/>
    </style:style>
    <style:style style:name="T6" style:family="text">
      <style:text-properties fo:color="#000000" style:font-name="Roboto" fo:font-size="11pt" fo:font-weight="bold" style:font-name-asian="Roboto1" style:font-size-asian="11pt" style:font-weight-asian="bold" style:font-name-complex="Roboto1" style:font-size-complex="11pt" style:font-weight-complex="bold"/>
    </style:style>
    <style:style style:name="T7" style:family="text">
      <style:text-properties fo:color="#1155cc" style:font-name="Roboto" fo:font-size="11pt" style:text-underline-style="solid" style:text-underline-width="auto" style:text-underline-color="font-color" style:font-name-asian="Roboto1" style:font-size-asian="11pt" style:font-name-complex="Roboto1" style:font-size-complex="11pt"/>
    </style:style>
    <style:style style:name="T8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position="super 58%" style:font-name="Roboto" style:font-name-asian="Roboto1" style:font-name-complex="Robot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bcrkmvsle8y7"/><text:span text:style-name="T1">Nikita Kazeev</text:span></text:p>
      <text:p text:style-name="P3"><text:span text:style-name="T2">Research scientist with 7+ years of experience at the intersection of AI and physics. Specializing in the development of novel machine learning models to solve bespoke challenges.</text:span></text:p>
      <text:p text:style-name="P33"><text:bookmark text:name="_1ldgl4bwsegg"/><text:span text:style-name="T1">Work Experience</text:span></text:p>
      <text:p text:style-name="P30"><text:bookmark text:name="_59n0a15qjeqz"/><text:span text:style-name="T1">National University of Singapore: </text:span><text:span text:style-name="T5">postdoc under </text:span><text:a xlink:type="simple" xlink:href="https://en.wikipedia.org/wiki/Konstantin_Novoselov" text:style-name="ListLabel_20_145" text:visited-style-name="ListLabel_20_145"><text:span text:style-name="T7">Kostya Novoselov</text:span></text:a><text:span text:style-name="T1"><text:tab/>2022 – present</text:span></text:p>
      <text:p text:style-name="P1"><text:span text:style-name="T3">AI for Materials</text:span></text:p>
      <text:p text:style-name="P1"><text:span text:style-name="T2">Wyckoff Transformer;</text:span><text:span text:style-name="T3"> </text:span><text:a xlink:type="simple" xlink:href="https://icml.cc/virtual/2025/poster/44595" text:style-name="ListLabel_20_146" text:visited-style-name="ListLabel_20_146"><text:span text:style-name="T8">ICML 2025</text:span></text:a><text:span text:style-name="T1">; </text:span><text:a xlink:type="simple" xlink:href="https://github.com/SymmetryAdvantage/WyckoffTransformer" text:style-name="ListLabel_20_146" text:visited-style-name="ListLabel_20_146"><text:span text:style-name="T8">code</text:span></text:a></text:p>
      <text:list xml:id="list2228604269" text:style-name="WWNum16">
        <text:list-item>
          <text:p text:style-name="P5"><text:span text:style-name="T1">Created a generative model for material design based on symmetry inductive bias;</text:span></text:p>
        </text:list-item>
        <text:list-item>
          <text:p text:style-name="P5"><text:span text:style-name="T1">Best novelty and space group learning compared to baselines</text:span></text:p>
        </text:list-item>
        <text:list-item>
          <text:p text:style-name="P5"><text:span text:style-name="T1">Coded the model in PyTorch; production-ready package published via PyPI</text:span></text:p>
        </text:list-item>
        <text:list-item>
          <text:p text:style-name="P5"><text:span text:style-name="T1">Ran large-scale (10k structures) DFT computations with VASP at an HPC cluster</text:span></text:p>
        </text:list-item>
        <text:list-item>
          <text:p text:style-name="P5"><text:span text:style-name="T1">Led a team of 6</text:span></text:p>
        </text:list-item>
      </text:list>
      <text:p text:style-name="P25"><text:span text:style-name="T2">Generative models for materials preprints under review:</text:span></text:p>
      <text:list xml:id="list779992803" text:style-name="WWNum3">
        <text:list-item>
          <text:p text:style-name="P6"><text:a xlink:type="simple" xlink:href="https://scholar.google.com/citations?view_op=view_citation&amp;hl=en&amp;user=vamy2okAAAAJ&amp;sortby=pubdate&amp;citation_for_view=vamy2okAAAAJ:jRIwE-1ttnoC" text:style-name="ListLabel_20_146" text:visited-style-name="ListLabel_20_146"><text:span text:style-name="T8">Composable Crystals</text:span></text:a></text:p>
        </text:list-item>
        <text:list-item>
          <text:p text:style-name="P6"><text:a xlink:type="simple" xlink:href="https://arxiv.org/abs/2605.14759" text:style-name="ListLabel_20_146" text:visited-style-name="ListLabel_20_146"><text:span text:style-name="T8">Crys-JEPA</text:span></text:a><text:span text:style-name="T1"> (Yann LeCun in co-authors)</text:span></text:p>
        </text:list-item>
        <text:list-item>
          <text:p text:style-name="P6"><text:a xlink:type="simple" xlink:href="https://arxiv.org/abs/2511.14426" text:style-name="ListLabel_20_146" text:visited-style-name="ListLabel_20_146"><text:span text:style-name="T8">MiAD</text:span></text:a></text:p>
        </text:list-item>
        <text:list-item>
          <text:p text:style-name="P6"><text:a xlink:type="simple" xlink:href="https://arxiv.org/abs/2512.04562" text:style-name="ListLabel_20_146" text:visited-style-name="ListLabel_20_146"><text:span text:style-name="T8">LeMat-GenBench: A Unified Evaluation Framework for Crystal Generative Models</text:span></text:a></text:p>
        </text:list-item>
      </text:list>
      <text:p text:style-name="P1"><text:span text:style-name="T3">ML for predicting properties of defects in 2D crystals;</text:span><text:span text:style-name="T1"> papers (</text:span><text:a xlink:type="simple" xlink:href="https://www.nature.com/articles/s41699-023-00369-1" text:style-name="ListLabel_20_146" text:visited-style-name="ListLabel_20_146"><text:span text:style-name="T8">1</text:span></text:a><text:span text:style-name="T1">, </text:span><text:a xlink:type="simple" xlink:href="https://www.nature.com/articles/s41524-023-01062-z" text:style-name="ListLabel_20_146" text:visited-style-name="ListLabel_20_146"><text:span text:style-name="T8">2</text:span></text:a><text:span text:style-name="T1">); </text:span><text:a xlink:type="simple" xlink:href="https://scholar.google.com/citations?view_op=view_citation&amp;hl=en&amp;user=vamy2okAAAAJ&amp;sortby=pubdate&amp;citation_for_view=vamy2okAAAAJ:uAPFzskPt0AC" text:style-name="ListLabel_20_146" text:visited-style-name="ListLabel_20_146"><text:span text:style-name="T8">patent</text:span></text:a><text:span text:style-name="T1">; </text:span><text:a xlink:type="simple" xlink:href="https://mh22-mrs.org.sg/files/MH22_Programme_Booklet_SYMPOSIA_GROUPING_13_SEPT.pdf" text:style-name="ListLabel_20_146" text:visited-style-name="ListLabel_20_146"><text:span text:style-name="T8">conference</text:span></text:a><text:span text:style-name="T1">; </text:span><text:a xlink:type="simple" xlink:href="https://github.com/HSE-LAMBDA/ai4material_design" text:style-name="ListLabel_20_146" text:visited-style-name="ListLabel_20_146"><text:span text:style-name="T8">code</text:span></text:a></text:p>
      <text:list xml:id="list2463622959" text:style-name="WWNum7">
        <text:list-item>
          <text:p text:style-name="P11"><text:span text:style-name="T1">Created sparse representation of crystals with defects, achieving 4x energy prediction error reduction</text:span></text:p>
        </text:list-item>
        <text:list-item>
          <text:p text:style-name="P11"><text:span text:style-name="T1">Developed code for reproducible parallel running of machine learning experiments</text:span></text:p>
        </text:list-item>
        <text:list-item>
          <text:p text:style-name="P11"><text:span text:style-name="T1">Led a team of 3</text:span></text:p>
        </text:list-item>
      </text:list>
      <text:p text:style-name="P1"><text:span text:style-name="T3">Leadership</text:span></text:p>
      <text:list xml:id="list619651505" text:style-name="WWNum1">
        <text:list-item>
          <text:p text:style-name="P7"><text:span text:style-name="T1">Program Chair at the 500+ person </text:span><text:a xlink:type="simple" xlink:href="https://ai4x.cc/" text:style-name="ListLabel_20_146" text:visited-style-name="ListLabel_20_146"><text:span text:style-name="T8">AI4X 2025/6 conferences</text:span></text:a><text:span text:style-name="T1">, leading speaker search and peer review</text:span></text:p>
        </text:list-item>
        <text:list-item>
          <text:p text:style-name="P7"><text:span text:style-name="T1">The main organizer of the</text:span><text:span text:style-name="T3"> </text:span><text:a xlink:type="simple" xlink:href="https://openreview.net/forum?id=uAtjhZW1QV" text:style-name="ListLabel_20_146" text:visited-style-name="ListLabel_20_146"><text:span text:style-name="T8">ICLR 2025 workshop</text:span></text:a><text:span text:style-name="T1"> on multiscale machine learning</text:span></text:p>
        </text:list-item>
      </text:list>
      <text:p text:style-name="P30"><text:bookmark text:name="_7dkqvweebuu9"/><text:span text:style-name="T1">CERN [Yandex → HSE University]<text:tab/>2014 – 2022</text:span></text:p>
      <text:p text:style-name="P27"><text:span text:style-name="T3">Received 2025 Breakthrough Prize in Fundamental Physics </text:span><text:a xlink:type="simple" xlink:href="https://breakthroughprize.org/Laureates/1/L3995" text:style-name="ListLabel_20_146" text:visited-style-name="ListLabel_20_146"><text:span text:style-name="T8">as a member of LHCb</text:span></text:a></text:p>
      <text:p text:style-name="P27"><text:soft-page-break/><text:span text:style-name="T3">Generative models uncertainty estimation</text:span><text:span text:style-name="T1">; </text:span><text:a xlink:type="simple" xlink:href="https://iopscience.iop.org/article/10.1088/1742-6596/2438/1/012088" text:style-name="ListLabel_20_146" text:visited-style-name="ListLabel_20_146"><text:span text:style-name="T8">paper</text:span></text:a><text:span text:style-name="T1">; </text:span><text:a xlink:type="simple" xlink:href="https://cds.cern.ch/record/2837844" text:style-name="ListLabel_20_146" text:visited-style-name="ListLabel_20_146"><text:span text:style-name="T8">conference</text:span></text:a><text:span text:style-name="T1">; code (</text:span><text:a xlink:type="simple" xlink:href="https://gitlab.com/lambda-hse/lhcb-rich-gan-uncertainty" text:style-name="ListLabel_20_146" text:visited-style-name="ListLabel_20_146"><text:span text:style-name="T8">1</text:span></text:a><text:span text:style-name="T1">, </text:span><text:a xlink:type="simple" xlink:href="https://gitlab.com/lambda-hse/gan-uncertainty-ensembles" text:style-name="ListLabel_20_146" text:visited-style-name="ListLabel_20_146"><text:span text:style-name="T8">2</text:span></text:a><text:span text:style-name="T1">)</text:span></text:p>
      <text:list xml:id="list1300310490" text:style-name="WWNum14">
        <text:list-item>
          <text:p text:style-name="P16"><text:span text:style-name="T1">Developed first ever methods for estimating uncertainty of conditional GANs</text:span></text:p>
        </text:list-item>
        <text:list-item>
          <text:p text:style-name="P16"><text:span text:style-name="T1">Lead a team of 3 students</text:span></text:p>
        </text:list-item>
      </text:list>
      <text:p text:style-name="P27"><text:span text:style-name="T3">Generative models for fast simulation</text:span><text:span text:style-name="T1">; papers (</text:span><text:a xlink:type="simple" xlink:href="https://www.sciencedirect.com/science/article/pii/S0168900219300701" text:style-name="ListLabel_20_146" text:visited-style-name="ListLabel_20_146"><text:span text:style-name="T8">1</text:span></text:a><text:span text:style-name="T1">, </text:span><text:a xlink:type="simple" xlink:href="https://arxiv.org/abs/1905.11825" text:style-name="ListLabel_20_146" text:visited-style-name="ListLabel_20_146"><text:span text:style-name="T8">2</text:span></text:a><text:span text:style-name="T1">, </text:span><text:a xlink:type="simple" xlink:href="https://ml4physicalsciences.github.io/files/NeurIPS_ML4PS_2019_40.pdf" text:style-name="ListLabel_20_146" text:visited-style-name="ListLabel_20_146"><text:span text:style-name="T8">3</text:span></text:a><text:span text:style-name="T1">); </text:span><text:a xlink:type="simple" xlink:href="https://github.com/yandexdataschool/QuantileTransformerTF" text:style-name="ListLabel_20_146" text:visited-style-name="ListLabel_20_146"><text:span text:style-name="T8">code</text:span></text:a><text:span text:style-name="T1">; news (</text:span><text:a xlink:type="simple" xlink:href="https://www.eurekalert.org/pub_releases/2019-03/nruh-ail031419.php" text:style-name="ListLabel_20_146" text:visited-style-name="ListLabel_20_146"><text:span text:style-name="T8">1</text:span></text:a><text:span text:style-name="T1">, </text:span><text:a xlink:type="simple" xlink:href="https://ria.ru/20190311/1551698619.html" text:style-name="ListLabel_20_146" text:visited-style-name="ListLabel_20_146"><text:span text:style-name="T8">2</text:span></text:a><text:span text:style-name="T1">, </text:span><text:a xlink:type="simple" xlink:href="https://www.popmech.ru/science/news-468032-sozdana-neyroset-uskoryayushchaya-poisk-novyh-chastic-na-lhc/" text:style-name="ListLabel_20_146" text:visited-style-name="ListLabel_20_146"><text:span text:style-name="T8">3</text:span></text:a><text:span text:style-name="T1">, </text:span><text:a xlink:type="simple" xlink:href="https://nauka.vesti.ru/article/1190805" text:style-name="ListLabel_20_146" text:visited-style-name="ListLabel_20_146"><text:span text:style-name="T8">4</text:span></text:a><text:span text:style-name="T1">, </text:span><text:a xlink:type="simple" xlink:href="https://hightech.fm/2019/03/12/cern-gun" text:style-name="ListLabel_20_146" text:visited-style-name="ListLabel_20_146"><text:span text:style-name="T8">5</text:span></text:a><text:span text:style-name="T1">)</text:span></text:p>
      <text:list xml:id="list335715623" text:style-name="WWNum15">
        <text:list-item>
          <text:p text:style-name="P17"><text:span text:style-name="T1">Developed a machine learning model (GAN) trained on tabular data for high-fidelity simulation of a Cherenkov detector achieving ~10</text:span><text:span text:style-name="T10">5 <text:s/></text:span><text:span text:style-name="T1">speed-up compared to the ab-initio simulator;</text:span></text:p>
        </text:list-item>
      </text:list>
      <text:p text:style-name="P27"><text:span text:style-name="T3">Machine learning on noisy data</text:span><text:span text:style-name="T1">; papers (</text:span><text:a xlink:type="simple" xlink:href="http://doi.org/10.1088/1748-0221/14/08/P08020" text:style-name="ListLabel_20_146" text:visited-style-name="ListLabel_20_146"><text:span text:style-name="T8">1</text:span></text:a><text:span text:style-name="T1">, </text:span><text:a xlink:type="simple" xlink:href="https://ml4physicalsciences.github.io/files/NeurIPS_ML4PS_2019_122.pdf" text:style-name="ListLabel_20_146" text:visited-style-name="ListLabel_20_146"><text:span text:style-name="T8">2</text:span></text:a><text:span text:style-name="T1">); </text:span><text:a xlink:type="simple" xlink:href="https://github.com/yandexdataschool/ML-sWeights-experiments/" text:style-name="ListLabel_20_146" text:visited-style-name="ListLabel_20_146"><text:span text:style-name="T8">code</text:span></text:a><text:span text:style-name="T1">; </text:span><text:a xlink:type="simple" xlink:href="https://youtu.be/f9EhbrNxLjs?t=4298'" text:style-name="ListLabel_20_146" text:visited-style-name="ListLabel_20_146"><text:span text:style-name="T8">presentation video</text:span></text:a></text:p>
      <text:list xml:id="list500016553" text:style-name="WWNum11">
        <text:list-item>
          <text:p text:style-name="P18"><text:span text:style-name="T1">Developed a way to rigorously train ML algorithms on data with label noise</text:span></text:p>
        </text:list-item>
      </text:list>
      <text:p text:style-name="P27"><text:span text:style-name="T3">CatBoost aka fighting biases with dynamic boosting</text:span><text:span text:style-name="T1">; </text:span><text:a xlink:type="simple" xlink:href="https://arxiv.org/abs/1706.09516v1" text:style-name="ListLabel_20_146" text:visited-style-name="ListLabel_20_146"><text:span text:style-name="T8">paper</text:span></text:a></text:p>
      <text:list xml:id="list1988332569" text:style-name="WWNum12">
        <text:list-item>
          <text:p text:style-name="P19"><text:span text:style-name="T1">Set up a distributed system for running experiments for the team with bash and Python</text:span></text:p>
        </text:list-item>
        <text:list-item>
          <text:p text:style-name="P19"><text:span text:style-name="T1">Studied gradient boosting enchantments with experiments on toy data</text:span></text:p>
        </text:list-item>
      </text:list>
      <text:p text:style-name="P34"><text:bookmark text:name="_g4nfzpbmxwp5"/><text:span text:style-name="T1">Education</text:span></text:p>
      <text:p text:style-name="P28"><text:span text:style-name="T3">Higher School of Economics (HSE University)</text:span><text:span text:style-name="T1"><text:tab/>2016 – 2020<text:line-break/>PhD in Computer Science, supervisor </text:span><text:a xlink:type="simple" xlink:href="https://www.linkedin.com/profile/view?id=2422149" text:style-name="ListLabel_20_146" text:visited-style-name="ListLabel_20_146"><text:span text:style-name="T8">Andrey Ustyuzhanin</text:span></text:a><text:span text:style-name="T1">;<text:line-break/></text:span><text:a xlink:type="simple" xlink:href="http://cds.cern.ch/record/2744601" text:style-name="ListLabel_20_146" text:visited-style-name="ListLabel_20_146"><text:span text:style-name="T8">Machine Learning for particle identification in the LHCb detector</text:span></text:a></text:p>
      <text:p text:style-name="P28"><text:span text:style-name="T3">Sapienza – Università di Roma</text:span><text:span text:style-name="T1"><text:tab/>2016 – 2020<text:line-break/>PhD in Physics (double degree with the HSE), supervisor </text:span><text:a xlink:type="simple" xlink:href="https://it.linkedin.com/in/barbara-sciascia-234935a" text:style-name="ListLabel_20_146" text:visited-style-name="ListLabel_20_146"><text:span text:style-name="T8">Barbara Sciascia</text:span></text:a></text:p>
      <text:p text:style-name="P28"><text:span text:style-name="T3">Product Management course at Yandex<text:tab/></text:span><text:span text:style-name="T1">spring 2018</text:span></text:p>
      <text:p text:style-name="P28"><text:span text:style-name="T3">Yandex School of Data Analysis</text:span><text:span text:style-name="T1"><text:tab/>2013 – 2015<text:line-break/>Master’s level CS course: Algorithms, Machine Learning, Deep Learning, Distributed Systems</text:span></text:p>
      <text:p text:style-name="P28"><text:span text:style-name="T3">Moscow Institute of Physics and Technology</text:span><text:span text:style-name="T1"><text:line-break/>MS in Physics<text:tab/>2014 – 2016<text:line-break/>Optimisation of data processing of the LHCb experiment</text:span></text:p>
      <text:p text:style-name="P28"><text:span text:style-name="T1">BS in Physics<text:tab/>2010 – 2014<text:line-break/>Study of the quantum states of the electrons in nonideal plasma and selected molecules using wave packet molecular dynamics with packet splitting</text:span></text:p>
      <text:p text:style-name="P35"><text:bookmark text:name="_70r56gyiny6h"/><text:span text:style-name="T1">Mentorship</text:span></text:p>
      <text:list xml:id="list2954380607" text:style-name="WWNum5">
        <text:list-item>
          <text:p text:style-name="P8"><text:span text:style-name="T1">Mentored 9 students (</text:span><text:a xlink:type="simple" xlink:href="https://www.hse.ru/edu/vkr/219430466" text:style-name="ListLabel_20_146" text:visited-style-name="ListLabel_20_146"><text:span text:style-name="T8">1</text:span></text:a><text:span text:style-name="T1">, </text:span><text:a xlink:type="simple" xlink:href="https://www.hse.ru/edu/vkr/296294066" text:style-name="ListLabel_20_146" text:visited-style-name="ListLabel_20_146"><text:span text:style-name="T8">2</text:span></text:a><text:span text:style-name="T1">, </text:span><text:a xlink:type="simple" xlink:href="https://www.hse.ru/edu/vkr/219524130" text:style-name="ListLabel_20_146" text:visited-style-name="ListLabel_20_146"><text:span text:style-name="T8">3</text:span></text:a><text:span text:style-name="T1">, </text:span><text:a xlink:type="simple" xlink:href="https://www.hse.ru/en/edu/vkr/470561417" text:style-name="ListLabel_20_146" text:visited-style-name="ListLabel_20_146"><text:span text:style-name="T8">4</text:span></text:a><text:span text:style-name="T1">, </text:span><text:a xlink:type="simple" xlink:href="https://www.hse.ru/en/edu/vkr/470935224" text:style-name="ListLabel_20_146" text:visited-style-name="ListLabel_20_146"><text:span text:style-name="T8">5</text:span></text:a><text:span text:style-name="T1">, </text:span><text:a xlink:type="simple" xlink:href="https://www.hse.ru/ma/datasci/students/diplomas/631565328" text:style-name="ListLabel_20_146" text:visited-style-name="ListLabel_20_146"><text:span text:style-name="T8">6</text:span></text:a><text:span text:style-name="T1">, </text:span><text:a xlink:type="simple" xlink:href="https://www.hse.ru/ma/datasci/students/diplomas/631565422" text:style-name="ListLabel_20_146" text:visited-style-name="ListLabel_20_146"><text:span text:style-name="T8">7</text:span></text:a><text:span text:style-name="T1">, </text:span><text:a xlink:type="simple" xlink:href="https://www.hse.ru/edu/vkr/624890096" text:style-name="ListLabel_20_146" text:visited-style-name="ListLabel_20_146"><text:span text:style-name="T8">8</text:span></text:a><text:span text:style-name="T1">, </text:span><text:a xlink:type="simple" xlink:href="https://www.hse.ru/ba/ami/students/diplomas/834351454" text:style-name="ListLabel_20_146" text:visited-style-name="ListLabel_20_146"><text:span text:style-name="T8">9</text:span></text:a><text:span text:style-name="T1">), 3 interns, <text:s/>student workshop projects (</text:span><text:a xlink:type="simple" xlink:href="https://sochisirius.ru/news/3148" text:style-name="ListLabel_20_146" text:visited-style-name="ListLabel_20_146"><text:span text:style-name="T8">1</text:span></text:a><text:span text:style-name="T1">, </text:span><text:a xlink:type="simple" xlink:href="https://academy.yandex.ru/posts/vossozdat-arkhitekturu-bazy-dannykh-i-nauchit-golosovogo-pomoschnika-predskazyvat-namereniya-polzovatelya" text:style-name="ListLabel_20_146" text:visited-style-name="ListLabel_20_146"><text:span text:style-name="T8">2</text:span></text:a><text:span text:style-name="T1">)</text:span></text:p>
        </text:list-item>
        <text:list-item>
          <text:p text:style-name="P21"><text:span text:style-name="T1">Student council member 2013 – 2016, led several dormitory-scale IT projects</text:span></text:p>
        </text:list-item>
        <text:list-item>
          <text:p text:style-name="P8"><text:span text:style-name="T1">Co-PI of a $3.4m AI Singapore grant multiscale machine learning</text:span></text:p>
        </text:list-item>
      </text:list>
      <text:p text:style-name="P35"><text:bookmark text:name="_tsjlgekuxmzf"/><text:span text:style-name="T1">Teaching and outreach</text:span></text:p>
      <text:list xml:id="list91118498" text:style-name="WWNum8">
        <text:list-item>
          <text:p text:style-name="P12"><text:span text:style-name="T1">Pitch my work to the general public: major Russian newspaper (</text:span><text:a xlink:type="simple" xlink:href="https://www.kommersant.ru/doc/7832307" text:style-name="ListLabel_20_146" text:visited-style-name="ListLabel_20_146"><text:span text:style-name="T8">1</text:span></text:a><text:span text:style-name="T1">, </text:span><text:a xlink:type="simple" xlink:href="https://www.kommersant.ru/doc/6122817" text:style-name="ListLabel_20_146" text:visited-style-name="ListLabel_20_146"><text:span text:style-name="T8">2</text:span></text:a><text:span text:style-name="T1">), blog (</text:span><text:a xlink:type="simple" xlink:href="https://ifim.nus.edu.sg/tailor-made-2d-materials-became-closer-with-the-new-machine-learning-algorithm-developed-at-nus/" text:style-name="ListLabel_20_146" text:visited-style-name="ListLabel_20_146"><text:span text:style-name="T8">1</text:span></text:a><text:span text:style-name="T1">, </text:span><text:a xlink:type="simple" xlink:href="https://communities.springernature.com/posts/sparse-representation-for-machine-learning-the-properties-of-defects-in-2d-materials" text:style-name="ListLabel_20_146" text:visited-style-name="ListLabel_20_146"><text:span text:style-name="T8">2</text:span></text:a><text:span text:style-name="T1">), </text:span><text:a xlink:type="simple" xlink:href="https://elementy.ru/events/435506/IV_Nauchnye_boi_NIU_VShE_na_Dne_Vyshki" text:style-name="ListLabel_20_146" text:visited-style-name="ListLabel_20_146"><text:span text:style-name="T8">science slam</text:span></text:a><text:span text:style-name="T1">, </text:span><text:a xlink:type="simple" xlink:href="https://academy.yandex.ru/posts/beresh-i-razbiraeshsya" text:style-name="ListLabel_20_146" text:visited-style-name="ListLabel_20_146"><text:span text:style-name="T8">interview</text:span></text:a><text:span text:style-name="T1">, </text:span><text:a xlink:type="simple" xlink:href="https://habr.com/en/company/yandex/blog/422761/" text:style-name="ListLabel_20_146" text:visited-style-name="ListLabel_20_146"><text:span text:style-name="T8">interview</text:span></text:a><text:span text:style-name="T1">, </text:span><text:a xlink:type="simple" xlink:href="https://www.youtube.com/watch?v=zLFZ_z-7-JI&amp;feature=youtu.be&amp;t=7779" text:style-name="ListLabel_20_146" text:visited-style-name="ListLabel_20_146"><text:span text:style-name="T8">talk</text:span></text:a></text:p>
        </text:list-item>
      </text:list>
      <text:list xml:id="list58003140" text:style-name="WWNum2">
        <text:list-item>
          <text:p text:style-name="P22"><text:span text:style-name="T1">Taught at Machine Learning in High Energy Physics Summer School in </text:span><text:a xlink:type="simple" xlink:href="https://indico.cern.ch/event/439520/" text:style-name="ListLabel_20_146" text:visited-style-name="ListLabel_20_146"><text:span text:style-name="T8">2015</text:span></text:a><text:span text:style-name="T1">, </text:span><text:a xlink:type="simple" xlink:href="https://indico.cern.ch/event/497368/" text:style-name="ListLabel_20_146" text:visited-style-name="ListLabel_20_146"><text:span text:style-name="T8">2016</text:span></text:a><text:span text:style-name="T1">, </text:span><text:a xlink:type="simple" xlink:href="https://indico.cern.ch/event/613571/" text:style-name="ListLabel_20_146" text:visited-style-name="ListLabel_20_146"><text:span text:style-name="T8">2017</text:span></text:a><text:span text:style-name="T1">, </text:span><text:a xlink:type="simple" xlink:href="https://indico.cern.ch/event/687473/" text:style-name="ListLabel_20_146" text:visited-style-name="ListLabel_20_146"><text:span text:style-name="T8">2018</text:span></text:a><text:span text:style-name="T1">, </text:span><text:a xlink:type="simple" xlink:href="https://indico.cern.ch/event/768915/" text:style-name="ListLabel_20_146" text:visited-style-name="ListLabel_20_146"><text:span text:style-name="T8">2019</text:span></text:a><text:span text:style-name="T1">, </text:span><text:a xlink:type="simple" xlink:href="https://indico.cern.ch/event/838377/" text:style-name="ListLabel_20_146" text:visited-style-name="ListLabel_20_146"><text:span text:style-name="T8">2020</text:span></text:a><text:span text:style-name="T1">, </text:span><text:a xlink:type="simple" xlink:href="https://indico.cern.ch/event/1025052/" text:style-name="ListLabel_20_146" text:visited-style-name="ListLabel_20_146"><text:span text:style-name="T8">2021</text:span></text:a><text:span text:style-name="T1">, </text:span><text:a xlink:type="simple" xlink:href="https://indico.cern.ch/event/1229514/" text:style-name="ListLabel_20_146" text:visited-style-name="ListLabel_20_146"><text:span text:style-name="T8">2023</text:span></text:a></text:p>
        </text:list-item>
      </text:list>
      <text:list xml:id="list989598424" text:style-name="WWNum10">
        <text:list-item>
          <text:p text:style-name="P23"><text:span text:style-name="T1">Lecturer at the </text:span><text:a xlink:type="simple" xlink:href="https://www.hse.ru/en/news/edu/259378493.html" text:style-name="ListLabel_20_146" text:visited-style-name="ListLabel_20_146"><text:span text:style-name="T8">award-winning</text:span></text:a><text:span text:style-name="T1"> Coursera Advanced Machine Learning </text:span><text:a xlink:type="simple" xlink:href="https://www.coursera.org/specializations/aml" text:style-name="ListLabel_20_146" text:visited-style-name="ListLabel_20_146"><text:span text:style-name="T8">specialisation</text:span></text:a></text:p>
        </text:list-item>
        <text:list-item>
          <text:p text:style-name="P20"><text:span text:style-name="T1">Introductory data analysis </text:span><text:a xlink:type="simple" xlink:href="https://we.hse.ru/en/courses/206646463.html" text:style-name="ListLabel_20_146" text:visited-style-name="ListLabel_20_146"><text:span text:style-name="T8">course</text:span></text:a><text:span text:style-name="T1"> at HSE - teaching &amp; course development</text:span></text:p>
        </text:list-item>
        <text:list-item>
          <text:p text:style-name="P20"><text:soft-page-break/><text:a xlink:type="simple" xlink:href="https://elementy.ru/events/435506/IV_Nauchnye_boi_NIU_VShE_na_Dne_Vyshki" text:style-name="ListLabel_20_146" text:visited-style-name="ListLabel_20_146"><text:span text:style-name="T8">Science battle</text:span></text:a><text:span text:style-name="T1">: a pitch of my research to the general public, in Russian</text:span></text:p>
        </text:list-item>
        <text:list-item>
          <text:p text:style-name="P13"><text:span text:style-name="T1">&gt;20 </text:span><text:a xlink:type="simple" xlink:href="https://docs.google.com/document/d/1IOlBse4q0YgEoL_RCJTvJfbFhFaD_YMAIJJ3W77B_X0/edit?usp=sharing" text:style-name="ListLabel_20_146" text:visited-style-name="ListLabel_20_146"><text:span text:style-name="T8">conference talks</text:span></text:a></text:p>
        </text:list-item>
      </text:list>
      <text:p text:style-name="P31"><text:bookmark text:name="_aza7hmw33lm3"/><text:span text:style-name="T1">Service</text:span></text:p>
      <text:list xml:id="list1475822035" text:style-name="WWNum13">
        <text:list-item>
          <text:p text:style-name="P9"><text:span text:style-name="T1">Reviewer for NeurIPS, RSC Advance, Machine Learning: Science and Technology, AI for Accelerated Materials Design Workshop @ NeurIPS &amp; ICLR 2023 – 2025; </text:span></text:p>
        </text:list-item>
        <text:list-item>
          <text:p text:style-name="P14"><text:span text:style-name="T1">Peer Staff Supporter at NUS, serving as a first line support for mental wellbeing</text:span></text:p>
        </text:list-item>
      </text:list>
      <text:p text:style-name="P33"><text:bookmark text:name="_9cfekwm9vrsu"/><text:span text:style-name="T1">Other</text:span></text:p>
      <text:list xml:id="list1973919541" text:style-name="WWNum6">
        <text:list-item>
          <text:p text:style-name="P24"><text:span text:style-name="T1">An aspiring stand-up comedian; bombed more than 20 times at open mics</text:span></text:p>
        </text:list-item>
        <text:list-item>
          <text:p text:style-name="P24"><text:span text:style-name="T1">International Junior Science Olympiad – 2008, Korea, silver medal</text:span></text:p>
        </text:list-item>
      </text:list>
      <text:p text:style-name="P31"><text:bookmark text:name="_npzafbsta9k3"/><text:span text:style-name="T1">Skills</text:span></text:p>
      <text:list xml:id="list215408067" text:style-name="WWNum9">
        <text:list-item>
          <text:p text:style-name="P10"><text:span text:style-name="T3">Machine Learning &amp; Artificial Intelligence, </text:span><text:span text:style-name="T1">with a focus on models for structured non-text domain-specific data</text:span></text:p>
        </text:list-item>
        <text:list-item>
          <text:p text:style-name="P10"><text:span text:style-name="T3">Scientific Computing: </text:span><text:span text:style-name="T1">VASP; orchestrating distributed calculations on HPC via MongoDB &amp; Fireworks</text:span></text:p>
        </text:list-item>
        <text:list-item>
          <text:p text:style-name="P10"><text:span text:style-name="T3">Programming:</text:span><text:span text:style-name="T1"> research coding in Python and pytorch; production in C++; Linux administration</text:span></text:p>
        </text:list-item>
        <text:list-item>
          <text:p text:style-name="P10"><text:span text:style-name="T3">Research writing &amp; speaking</text:span></text:p>
        </text:list-item>
        <text:list-item>
          <text:p text:style-name="P10"><text:span text:style-name="T3">Physics</text:span><text:span text:style-name="T1">: deep understanding of natural science</text:span></text:p>
        </text:list-item>
        <text:list-item>
          <text:p text:style-name="P10"><text:span text:style-name="T3">Collaboration, leadership &amp; mentorship</text:span></text:p>
        </text:list-item>
        <text:list-item>
          <text:p text:style-name="P10"><text:span text:style-name="T3">Languages: </text:span><text:span text:style-name="T1">Russian (native), English (fluent, IELTS 8)</text:span></text:p>
        </text:list-item>
      </text:list>
      <text:p text:style-name="P32"><text:bookmark text:name="_y7sefho7qdub"/><text:span text:style-name="T1">Academic publications</text:span></text:p>
      <text:p text:style-name="P26"><text:span text:style-name="T1">All: </text:span><text:a xlink:type="simple" xlink:href="https://scholar.google.com/citations?user=vamy2okAAAAJ" text:style-name="ListLabel_20_146" text:visited-style-name="ListLabel_20_146"><text:span text:style-name="T8">Google Scholar</text:span></text:a></text:p>
      <text:p text:style-name="Standard"><text:span text:style-name="T3">Selected:</text:span></text:p>
      <text:list xml:id="list3168992678" text:style-name="WWNum4">
        <text:list-item>
          <text:p text:style-name="P15"><text:span text:style-name="T3">Kazeev, Nikita</text:span><text:span text:style-name="T1">, et al. "</text:span><text:a xlink:type="simple" xlink:href="https://arxiv.org/abs/2503.02407" text:style-name="ListLabel_20_146" text:visited-style-name="ListLabel_20_146"><text:span text:style-name="T8">WyckoffTransformer: Generation of Symmetric Crystals.</text:span></text:a><text:span text:style-name="T1">" ICML 2025</text:span></text:p>
        </text:list-item>
        <text:list-item>
          <text:p text:style-name="P15"><text:span text:style-name="T3">Kazeev, N.</text:span><text:span text:style-name="T1">, Al-Maeeni, A.R., Romanov, I. et al.</text:span><text:span text:style-name="T3"> </text:span><text:a xlink:type="simple" xlink:href="https://doi.org/10.1038/s41524-023-01062-z" text:style-name="ListLabel_20_146" text:visited-style-name="ListLabel_20_146"><text:span text:style-name="T8">Sparse representation for machine learning the properties of defects in 2D materials. npj Comput Mater 9, 113 (2023).</text:span></text:a></text:p>
        </text:list-item>
        <text:list-item>
          <text:p text:style-name="P15"><text:a xlink:type="simple" xlink:href="https://iopscience.iop.org/article/10.1088/1742-6596/2438/1/012088/meta" text:style-name="ListLabel_20_146" text:visited-style-name="ListLabel_20_146"><text:span text:style-name="T8">Anderlini, L., Chimpoesh, C., Kazeev, N., Shishigina, A., &amp; LHCb collaboration. (2023, February). Generative models uncertainty estimation. In Journal of Physics: Conference Series (Vol. 2438, No. 1, p. 012088). IOP Publishing.</text:span></text:a><text:span text:style-name="T1">, </text:span><text:span text:style-name="T3">I’m the corresponding author, </text:span><text:span text:style-name="T1">alphabetical author order.</text:span></text:p>
        </text:list-item>
        <text:list-item>
          <text:p text:style-name="P15"><text:span text:style-name="T1">M. Borisyak and N. Kazeev. “Machine Learning on data with sPlot background subtraction”. In: Journal of Instrumentation 14.08 (Aug. 2019), P08020–P08020. </text:span><text:a xlink:type="simple" xlink:href="https://doi.org/10.1088%2F1748-0221%2F14%2F08%2Fp08020" text:style-name="ListLabel_20_146" text:visited-style-name="ListLabel_20_146"><text:span text:style-name="T8">doi: 10.1088/1748-0221/14/08/p08020</text:span></text:a><text:span text:style-name="T1">. </text:span><text:span text:style-name="T3">I’m the corresponding author</text:span><text:span text:style-name="T1">, alphabetical author order.</text:span></text:p>
        </text:list-item>
        <text:list-item>
          <text:p text:style-name="P15"><text:span text:style-name="T1">Derkach, D., Kazeev, N., Ratnikov, F., Ustyuzhanin, A., &amp; Volokhova, A. (2019). Cherenkov detectors fast simulation using neural networks. </text:span><text:span text:style-name="T2">Nuclear Instruments and Methods in Physics Research Section A: Accelerators, Spectrometers, Detectors and Associated Equipment</text:span><text:span text:style-name="T1">. </text:span><text:a xlink:type="simple" xlink:href="https://doi.org/10.1016/j.nima.2019.01.031" text:style-name="ListLabel_20_146" text:visited-style-name="ListLabel_20_146"><text:span text:style-name="T8">https://doi.org/10.1016/j.nima.2019.01.031</text:span></text:a><text:span text:style-name="T1"> </text:span><text:span text:style-name="T3">I’m the corresponding author, </text:span><text:span text:style-name="T1">alphabetical author ord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Roboto" fo:font-family="Roboto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oboto" fo:font-family="Roboto" style:font-family-generic="roman" style:font-pitch="variable" fo:font-size="11pt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Roboto" fo:font-family="Roboto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Roboto" fo:font-family="Roboto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Roboto" fo:font-family="Roboto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Roboto" fo:font-family="Roboto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Roboto" fo:font-family="Roboto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Roboto" fo:font-family="Roboto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Roboto" fo:font-family="Roboto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1155cc" style:font-name="Roboto" fo:font-family="Roboto" style:font-family-generic="roman" style:font-pitch="variable" fo:font-size="11pt" style:text-underline-style="solid" style:text-underline-width="auto" style:text-underline-color="font-color" style:font-name-asian="Roboto1" style:font-family-asian="Roboto" style:font-family-generic-asian="system" style:font-pitch-asian="variable" style:font-size-asian="11pt" style:font-name-complex="Roboto1" style:font-family-complex="Roboto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6" style:display-name="ListLabel 146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147" style:display-name="ListLabel 147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orphans="0" fo:widows="0">
        <style:tab-stops>
          <style:tab-stop style:position="6.2811in" style:type="right"/>
        </style:tab-stops>
      </style:paragraph-properties>
    </style:style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8.2681in" fo:page-height="11.6929in" style:num-format="1" style:print-orientation="portrait" fo:margin-top="0in" fo:margin-bottom="0.9in" fo:margin-left="0.9in" fo:margin-right="0.9in" style:writing-mode="lr-tb" style:layout-grid-color="#c0c0c0" style:layout-grid-lines="2512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in" fo:margin-bottom="0.5in" fo:margin-left="0.9in" fo:margin-right="0.9in" style:writing-mode="lr-tb" style:layout-grid-color="#c0c0c0" style:layout-grid-lines="2512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2">📧 <text:a xlink:type="simple" xlink:href="mailto:kazeevn@gmail.com" text:style-name="ListLabel_20_147" text:visited-style-name="ListLabel_20_147"><text:span text:style-name="MT1">kazeevn@gmail.com</text:span></text:a> <text:s text:c="3"/>☎<text:a xlink:type="simple" xlink:href="tel:+6593539837" text:style-name="ListLabel_20_147" text:visited-style-name="ListLabel_20_147"><text:span text:style-name="MT1">+65-9353-9837</text:span></text:a><text:tab/> <text:s text:c="4"/>🌐<text:a xlink:type="simple" xlink:href="https://scholar.google.com/citations?user=vamy2okAAAAJ" text:style-name="ListLabel_20_147" text:visited-style-name="ListLabel_20_147"><text:span text:style-name="MT1">Google Scholar</text:span></text:a></text:p>
        <text:p text:style-name="MP2">Resident in Singapore, open to relocation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7" meta:word-count="893" meta:character-count="5920" meta:non-whitespace-character-count="5128"/>
    <meta:generator>LibreOfficeDev/6.0.5.2$Linux_X86_64 LibreOffice_project/</meta:generator>
  </office:meta>
</office:document-meta>
</file>